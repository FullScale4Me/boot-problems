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itle">
      <style:paragraph-properties fo:margin-top="0in" fo:margin-bottom="0.0799in" style:contextual-spacing="false"/>
      <style:text-properties fo:font-size="24pt" style:font-size-asian="24pt" style:font-size-complex="24pt"/>
    </style:style>
    <style:style style:name="P2" style:family="paragraph" style:parent-style-name="Standard">
      <style:paragraph-properties fo:text-align="left" style:justify-single-word="false"/>
      <style:text-properties fo:font-weight="bold" officeooo:rsid="001519af" officeooo:paragraph-rsid="001519af" style:font-weight-asian="bold" style:font-weight-complex="bold"/>
    </style:style>
    <style:style style:name="P3" style:family="paragraph" style:parent-style-name="Text_20_body">
      <style:paragraph-properties fo:margin-top="0in" fo:margin-bottom="0in" style:contextual-spacing="false"/>
      <style:text-properties fo:font-size="12pt" style:font-size-asian="10.5pt" style:font-size-complex="12pt"/>
    </style:style>
    <style:style style:name="P4" style:family="paragraph" style:parent-style-name="Heading_20_2">
      <style:text-properties officeooo:rsid="0059f9e6" officeooo:paragraph-rsid="0059f9e6"/>
    </style:style>
    <style:style style:name="P5" style:family="paragraph" style:parent-style-name="Standard">
      <style:text-properties officeooo:rsid="0006377c" officeooo:paragraph-rsid="0059f9e6"/>
    </style:style>
    <style:style style:name="P6" style:family="paragraph" style:parent-style-name="Heading_20_3">
      <style:text-properties officeooo:paragraph-rsid="0059f9e6"/>
    </style:style>
    <style:style style:name="P7" style:family="paragraph" style:parent-style-name="Standard">
      <style:text-properties fo:font-size="6pt" fo:font-weight="normal" officeooo:rsid="0006377c" officeooo:paragraph-rsid="0059f9e6" style:font-size-asian="5.25pt" style:font-weight-asian="normal" style:font-size-complex="6pt" style:font-weight-complex="normal"/>
    </style:style>
    <style:style style:name="P8" style:family="paragraph" style:parent-style-name="Standard">
      <style:text-properties fo:font-size="6pt" officeooo:rsid="0006377c" officeooo:paragraph-rsid="0059f9e6" style:font-size-asian="5.25pt" style:font-size-complex="6pt"/>
    </style:style>
    <style:style style:name="P9" style:family="paragraph" style:parent-style-name="Standard" style:list-style-name="L1">
      <style:paragraph-properties fo:margin-top="0.0398in" fo:margin-bottom="0.0398in" style:contextual-spacing="false"/>
      <style:text-properties officeooo:rsid="000d3b50" officeooo:paragraph-rsid="0059f9e6"/>
    </style:style>
    <style:style style:name="P10" style:family="paragraph" style:parent-style-name="Standard" style:list-style-name="L1">
      <style:paragraph-properties fo:margin-top="0.0398in" fo:margin-bottom="0.0398in" style:contextual-spacing="false"/>
      <style:text-properties officeooo:paragraph-rsid="0059f9e6"/>
    </style:style>
    <style:style style:name="P11" style:family="paragraph" style:parent-style-name="Standard" style:list-style-name="L1">
      <style:paragraph-properties fo:margin-top="0.0398in" fo:margin-bottom="0.0398in" style:contextual-spacing="false"/>
      <style:text-properties officeooo:rsid="000903ae" officeooo:paragraph-rsid="0059f9e6"/>
    </style:style>
    <style:style style:name="P12" style:family="paragraph" style:parent-style-name="Standard">
      <style:text-properties fo:font-size="10pt" officeooo:rsid="0004899e" officeooo:paragraph-rsid="0059f9e6" style:font-size-asian="8.75pt" style:font-size-complex="10pt"/>
    </style:style>
    <style:style style:name="P13" style:family="paragraph" style:parent-style-name="Standard">
      <style:text-properties officeooo:paragraph-rsid="0054800b"/>
    </style:style>
    <style:style style:name="P14" style:family="paragraph" style:parent-style-name="Standard">
      <style:text-properties officeooo:paragraph-rsid="0057224b"/>
    </style:style>
    <style:style style:name="P15" style:family="paragraph" style:parent-style-name="Standard" style:list-style-name="L2">
      <style:text-properties officeooo:paragraph-rsid="0057224b"/>
    </style:style>
    <style:style style:name="P16" style:family="paragraph" style:parent-style-name="Standard">
      <style:paragraph-properties fo:text-align="center" style:justify-single-word="false"/>
      <style:text-properties officeooo:paragraph-rsid="0057224b"/>
    </style:style>
    <style:style style:name="P17" style:family="paragraph" style:parent-style-name="Standard">
      <style:text-properties officeooo:paragraph-rsid="00582f6e"/>
    </style:style>
    <style:style style:name="P18" style:family="paragraph" style:parent-style-name="Standard">
      <style:paragraph-properties fo:margin-left="0in" fo:text-indent="0in" style:auto-text-indent="false">
        <style:tab-stops/>
      </style:paragraph-properties>
      <style:text-properties officeooo:rsid="00119481" officeooo:paragraph-rsid="0036e745"/>
    </style:style>
    <style:style style:name="P19" style:family="paragraph" style:parent-style-name="Standard">
      <style:text-properties officeooo:rsid="0036e745" officeooo:paragraph-rsid="0036e745"/>
    </style:style>
    <style:style style:name="P20" style:family="paragraph" style:parent-style-name="Standard">
      <style:paragraph-properties fo:margin-left="0.9in" fo:text-indent="-0.9in" style:auto-text-indent="false">
        <style:tab-stops/>
      </style:paragraph-properties>
      <style:text-properties officeooo:paragraph-rsid="000903ae"/>
    </style:style>
    <style:style style:name="P21" style:family="paragraph" style:parent-style-name="Standard">
      <style:text-properties fo:font-size="6pt" officeooo:paragraph-rsid="000903ae" style:font-size-asian="5.25pt" style:font-size-complex="6pt"/>
    </style:style>
    <style:style style:name="P22" style:family="paragraph" style:parent-style-name="Standard" style:list-style-name="L3">
      <style:paragraph-properties fo:margin-top="0.0398in" fo:margin-bottom="0.0398in" style:contextual-spacing="false"/>
      <style:text-properties officeooo:paragraph-rsid="000e2d7c"/>
    </style:style>
    <style:style style:name="P23" style:family="paragraph" style:parent-style-name="Standard" style:list-style-name="L3">
      <style:paragraph-properties fo:margin-top="0.0398in" fo:margin-bottom="0.0398in" style:contextual-spacing="false"/>
      <style:text-properties officeooo:rsid="000eacc3" officeooo:paragraph-rsid="000f04ac"/>
    </style:style>
    <style:style style:name="P24" style:family="paragraph" style:parent-style-name="Standard" style:list-style-name="L3">
      <style:paragraph-properties fo:margin-top="0.0008in" fo:margin-bottom="0.0402in" style:contextual-spacing="false"/>
      <style:text-properties officeooo:rsid="000f04ac" officeooo:paragraph-rsid="000f04ac"/>
    </style:style>
    <style:style style:name="P25" style:family="paragraph" style:parent-style-name="Standard" style:list-style-name="L3">
      <style:paragraph-properties fo:margin-top="0.0008in" fo:margin-bottom="0.0402in" style:contextual-spacing="false"/>
      <style:text-properties officeooo:rsid="000eacc3" officeooo:paragraph-rsid="000eacc3"/>
    </style:style>
    <style:style style:name="P26" style:family="paragraph" style:parent-style-name="Standard">
      <style:text-properties fo:font-weight="bold" officeooo:rsid="0006377c" officeooo:paragraph-rsid="0006377c" style:font-weight-asian="bold" style:font-weight-complex="bold"/>
    </style:style>
    <style:style style:name="P27" style:family="paragraph" style:parent-style-name="Standard">
      <style:text-properties fo:font-weight="bold" officeooo:rsid="0006377c" officeooo:paragraph-rsid="00478422" style:font-weight-asian="bold" style:font-weight-complex="bold"/>
    </style:style>
    <style:style style:name="P28" style:family="paragraph" style:parent-style-name="Standard">
      <style:text-properties fo:font-size="6pt" fo:font-weight="bold" officeooo:rsid="0006377c" officeooo:paragraph-rsid="00478422" style:font-size-asian="5.25pt" style:font-weight-asian="bold" style:font-size-complex="6pt" style:font-weight-complex="bold"/>
    </style:style>
    <style:style style:name="P29" style:family="paragraph" style:parent-style-name="Standard">
      <style:text-properties officeooo:rsid="0006377c" officeooo:paragraph-rsid="00478422"/>
    </style:style>
    <style:style style:name="P30" style:family="paragraph" style:parent-style-name="Standard">
      <style:text-properties fo:font-size="6pt" officeooo:rsid="0006377c" officeooo:paragraph-rsid="0006377c" style:font-size-asian="5.25pt" style:font-size-complex="6pt"/>
    </style:style>
    <style:style style:name="P31" style:family="paragraph" style:parent-style-name="Standard" style:list-style-name="L4">
      <style:text-properties officeooo:rsid="000adcd1" officeooo:paragraph-rsid="000adcd1"/>
    </style:style>
    <style:style style:name="P32" style:family="paragraph" style:parent-style-name="Standard">
      <style:text-properties officeooo:rsid="0006377c" officeooo:paragraph-rsid="0006377c"/>
    </style:style>
    <style:style style:name="P33" style:family="paragraph" style:parent-style-name="Standard">
      <style:text-properties fo:font-size="10pt" officeooo:rsid="0004899e" officeooo:paragraph-rsid="0006377c" style:font-size-asian="8.75pt" style:font-size-complex="10pt"/>
    </style:style>
    <style:style style:name="P34" style:family="paragraph" style:parent-style-name="Heading_20_2">
      <style:paragraph-properties fo:break-before="page"/>
    </style:style>
    <style:style style:name="P35" style:family="paragraph" style:parent-style-name="Standard">
      <style:text-properties officeooo:paragraph-rsid="00557377"/>
    </style:style>
    <style:style style:name="P36" style:family="paragraph" style:parent-style-name="Standard">
      <style:text-properties fo:font-weight="bold" officeooo:rsid="005f51f0" officeooo:paragraph-rsid="005f51f0" style:font-weight-asian="bold" style:font-weight-complex="bold"/>
    </style:style>
    <style:style style:name="P37" style:family="paragraph" style:parent-style-name="Standard">
      <style:text-properties officeooo:rsid="005f51f0" officeooo:paragraph-rsid="005f51f0"/>
    </style:style>
    <style:style style:name="P38" style:family="paragraph" style:parent-style-name="Standard">
      <style:text-properties fo:font-size="6pt" officeooo:rsid="005f51f0" officeooo:paragraph-rsid="005f51f0" style:font-size-asian="5.25pt" style:font-size-complex="6pt"/>
    </style:style>
    <style:style style:name="P39" style:family="paragraph" style:parent-style-name="Standard">
      <style:paragraph-properties fo:margin-left="0.4925in" fo:text-indent="0in" style:auto-text-indent="false"/>
      <style:text-properties officeooo:rsid="005f51f0" officeooo:paragraph-rsid="005f51f0"/>
    </style:style>
    <style:style style:name="P40" style:family="paragraph" style:parent-style-name="Standard">
      <style:text-properties fo:font-weight="bold" officeooo:paragraph-rsid="00557377" style:font-weight-asian="bold" style:font-weight-complex="bold"/>
    </style:style>
    <style:style style:name="P41" style:family="paragraph" style:parent-style-name="Standard">
      <style:text-properties officeooo:paragraph-rsid="00569ead"/>
    </style:style>
    <style:style style:name="P42" style:family="paragraph" style:parent-style-name="Standard">
      <style:text-properties officeooo:paragraph-rsid="0052e9ea"/>
    </style:style>
    <style:style style:name="P43" style:family="paragraph" style:parent-style-name="Text_20_body">
      <style:paragraph-properties fo:margin-top="0in" fo:margin-bottom="0in" style:contextual-spacing="false"/>
    </style:style>
    <style:style style:name="P44" style:family="paragraph" style:parent-style-name="Preformatted_20_Text">
      <style:paragraph-properties fo:margin-left="0.4925in" fo:text-indent="0in" style:auto-text-indent="false"/>
    </style:style>
    <style:style style:name="P45" style:family="paragraph" style:parent-style-name="Preformatted_20_Text">
      <style:paragraph-properties fo:margin-left="0.4925in" fo:margin-top="0in" fo:margin-bottom="0.1965in" style:contextual-spacing="false" fo:text-indent="0in" style:auto-text-indent="false"/>
    </style:style>
    <style:style style:name="P46" style:family="paragraph" style:parent-style-name="Standard">
      <style:paragraph-properties fo:margin-top="0.0799in" fo:margin-bottom="0.0402in" style:contextual-spacing="false"/>
      <style:text-properties officeooo:paragraph-rsid="0058671b"/>
    </style:style>
    <style:style style:name="P47" style:family="paragraph" style:parent-style-name="Preformatted_20_Text">
      <style:paragraph-properties fo:margin-top="0.0799in" fo:margin-bottom="0.0402in" style:contextual-spacing="false" fo:text-align="center" style:justify-single-word="false"/>
    </style:style>
    <style:style style:name="P48" style:family="paragraph" style:parent-style-name="Text_20_body">
      <style:paragraph-properties fo:margin-top="0.0799in" fo:margin-bottom="0.0402in" style:contextual-spacing="false"/>
      <style:text-properties officeooo:paragraph-rsid="005975aa"/>
    </style:style>
    <style:style style:name="P49" style:family="paragraph" style:parent-style-name="Standard">
      <style:text-properties officeooo:paragraph-rsid="005975aa"/>
    </style:style>
    <style:style style:name="P50" style:family="paragraph" style:parent-style-name="Standard">
      <style:text-properties fo:font-size="6pt" style:font-size-asian="5.25pt" style:font-size-complex="6pt"/>
    </style:style>
    <style:style style:name="P51" style:family="paragraph" style:parent-style-name="Text_20_body">
      <style:paragraph-properties fo:margin-top="0.0799in" fo:margin-bottom="0.0402in" style:contextual-spacing="false"/>
      <style:text-properties officeooo:rsid="005975aa" officeooo:paragraph-rsid="005975aa"/>
    </style:style>
    <style:style style:name="P52" style:family="paragraph" style:parent-style-name="Standard">
      <style:paragraph-properties fo:margin-top="0.0398in" fo:margin-bottom="0.0398in" style:contextual-spacing="false"/>
      <style:text-properties officeooo:paragraph-rsid="003dcacb"/>
    </style:style>
    <style:style style:name="P53" style:family="paragraph" style:parent-style-name="Standard">
      <style:paragraph-properties fo:margin-top="0.0398in" fo:margin-bottom="0.0398in" style:contextual-spacing="false"/>
      <style:text-properties fo:font-size="12pt" officeooo:rsid="003233fd" officeooo:paragraph-rsid="003dcacb" style:font-size-asian="12pt" style:font-size-complex="12pt"/>
    </style:style>
    <style:style style:name="P54" style:family="paragraph" style:parent-style-name="Standard">
      <style:text-properties officeooo:rsid="0006cff0" officeooo:paragraph-rsid="000903ae"/>
    </style:style>
    <style:style style:name="P55" style:family="paragraph" style:parent-style-name="Standard">
      <style:text-properties fo:font-weight="bold" officeooo:rsid="0006cff0" officeooo:paragraph-rsid="00304ef2" style:font-weight-asian="bold" style:font-weight-complex="bold"/>
    </style:style>
    <style:style style:name="P56" style:family="paragraph" style:parent-style-name="Standard">
      <style:text-properties fo:font-weight="normal" officeooo:rsid="001a1a74" officeooo:paragraph-rsid="00304ef2" style:font-weight-asian="normal" style:font-weight-complex="normal"/>
    </style:style>
    <style:style style:name="P57" style:family="paragraph" style:parent-style-name="Standard">
      <style:paragraph-properties>
        <style:tab-stops/>
      </style:paragraph-properties>
      <style:text-properties fo:font-size="10pt" fo:font-weight="normal" officeooo:rsid="00304ef2" officeooo:paragraph-rsid="003ef0aa" style:font-size-asian="10pt" style:font-weight-asian="normal" style:font-size-complex="10pt" style:font-weight-complex="normal"/>
    </style:style>
    <style:style style:name="P58" style:family="paragraph" style:parent-style-name="Standard">
      <style:paragraph-properties>
        <style:tab-stops/>
      </style:paragraph-properties>
      <style:text-properties fo:font-size="12pt" fo:font-weight="normal" officeooo:rsid="00304ef2" officeooo:paragraph-rsid="003ef0aa" style:font-size-asian="10.5pt" style:font-weight-asian="normal" style:font-size-complex="12pt" style:font-weight-complex="normal"/>
    </style:style>
    <style:style style:name="P59" style:family="paragraph" style:parent-style-name="Standard">
      <style:text-properties officeooo:rsid="0006cff0" officeooo:paragraph-rsid="0006cff0"/>
    </style:style>
    <style:style style:name="P60" style:family="paragraph" style:parent-style-name="Standard">
      <style:text-properties officeooo:paragraph-rsid="0059f9e6"/>
    </style:style>
    <style:style style:name="P61" style:family="paragraph" style:parent-style-name="Standard">
      <style:text-properties officeooo:paragraph-rsid="0006cff0"/>
    </style:style>
    <style:style style:name="P62" style:family="paragraph" style:parent-style-name="Standard">
      <style:text-properties officeooo:rsid="0006cff0" officeooo:paragraph-rsid="000c5ffc"/>
    </style:style>
    <style:style style:name="P63" style:family="paragraph" style:parent-style-name="Standard">
      <style:text-properties fo:font-size="6pt" fo:font-weight="normal" officeooo:rsid="000c5ffc" officeooo:paragraph-rsid="000c5ffc" style:font-size-asian="5.25pt" style:font-weight-asian="normal" style:font-size-complex="6pt" style:font-weight-complex="normal"/>
    </style:style>
    <style:style style:name="P64" style:family="paragraph" style:parent-style-name="Standard" style:list-style-name="L5">
      <style:paragraph-properties fo:margin-top="0.0398in" fo:margin-bottom="0.0398in" style:contextual-spacing="false"/>
      <style:text-properties fo:font-weight="normal" officeooo:rsid="000c5ffc" officeooo:paragraph-rsid="000c5ffc" style:font-weight-asian="normal" style:font-weight-complex="normal"/>
    </style:style>
    <style:style style:name="P65" style:family="paragraph" style:parent-style-name="Standard">
      <style:text-properties fo:font-weight="bold" officeooo:rsid="0007914a" officeooo:paragraph-rsid="000d3b50" style:font-weight-asian="bold" style:font-weight-complex="bold"/>
    </style:style>
    <style:style style:name="P66" style:family="paragraph" style:parent-style-name="Standard">
      <style:text-properties fo:font-size="6pt" fo:font-weight="normal" officeooo:rsid="0007914a" officeooo:paragraph-rsid="000d3b50" style:font-size-asian="5.25pt" style:font-weight-asian="normal" style:font-size-complex="6pt" style:font-weight-complex="normal"/>
    </style:style>
    <style:style style:name="P67" style:family="paragraph" style:parent-style-name="Standard" style:list-style-name="L6">
      <style:text-properties officeooo:paragraph-rsid="000d3b50"/>
    </style:style>
    <style:style style:name="P68" style:family="paragraph" style:parent-style-name="Standard">
      <style:text-properties fo:font-weight="normal" officeooo:rsid="000d3b50" officeooo:paragraph-rsid="000d3b50" style:font-weight-asian="normal" style:font-weight-complex="normal"/>
    </style:style>
    <style:style style:name="P69" style:family="paragraph" style:parent-style-name="Standard">
      <style:text-properties officeooo:rsid="001709f7" officeooo:paragraph-rsid="001709f7"/>
    </style:style>
    <style:style style:name="P70" style:family="paragraph" style:parent-style-name="Standard">
      <style:text-properties officeooo:rsid="0017c327" officeooo:paragraph-rsid="0017c327"/>
    </style:style>
    <style:style style:name="P71" style:family="paragraph" style:parent-style-name="Standard">
      <style:text-properties officeooo:rsid="00444ecc" officeooo:paragraph-rsid="00444ecc"/>
    </style:style>
    <style:style style:name="P72" style:family="paragraph" style:parent-style-name="Text_20_body">
      <style:paragraph-properties fo:margin-top="0in" fo:margin-bottom="0.1in" style:contextual-spacing="false" fo:line-height="115%" fo:text-align="left" style:justify-single-word="false" style:writing-mode="lr-tb"/>
      <style:text-properties officeooo:paragraph-rsid="00582f6e"/>
    </style:style>
    <style:style style:name="P73" style:family="paragraph" style:parent-style-name="Standard">
      <style:paragraph-properties fo:text-align="justify" style:justify-single-word="false"/>
      <style:text-properties officeooo:rsid="0013a858" officeooo:paragraph-rsid="001a907f"/>
    </style:style>
    <style:style style:name="T1" style:family="text">
      <style:text-properties fo:font-weight="bold" officeooo:rsid="0057224b" style:font-weight-asian="bold" style:font-weight-complex="bold"/>
    </style:style>
    <style:style style:name="T2" style:family="text">
      <style:text-properties officeooo:rsid="0057224b"/>
    </style:style>
    <style:style style:name="T3" style:family="text">
      <style:text-properties fo:font-size="12pt" style:font-size-asian="10.5pt" style:font-size-complex="12pt"/>
    </style:style>
    <style:style style:name="T4" style:family="text">
      <style:text-properties fo:font-weight="bold" style:font-weight-asian="bold" style:font-weight-complex="bold"/>
    </style:style>
    <style:style style:name="T5" style:family="text">
      <style:text-properties fo:font-weight="bold" officeooo:rsid="000c5ffc" style:font-weight-asian="bold" style:font-weight-complex="bold"/>
    </style:style>
    <style:style style:name="T6" style:family="text">
      <style:text-properties fo:font-weight="bold" officeooo:rsid="00582f6e" style:font-weight-asian="bold" style:font-weight-complex="bold"/>
    </style:style>
    <style:style style:name="T7" style:family="text">
      <style:text-properties officeooo:rsid="00487311"/>
    </style:style>
    <style:style style:name="T8" style:family="text">
      <style:text-properties officeooo:rsid="000903ae"/>
    </style:style>
    <style:style style:name="T9" style:family="text">
      <style:text-properties officeooo:rsid="000c5ffc"/>
    </style:style>
    <style:style style:name="T10" style:family="text">
      <style:text-properties officeooo:rsid="0022ead2"/>
    </style:style>
    <style:style style:name="T11" style:family="text">
      <style:text-properties officeooo:rsid="000d6a32"/>
    </style:style>
    <style:style style:name="T12" style:family="text">
      <style:text-properties officeooo:rsid="000e2d7c"/>
    </style:style>
    <style:style style:name="T13" style:family="text">
      <style:text-properties officeooo:rsid="0024174e"/>
    </style:style>
    <style:style style:name="T14" style:family="text">
      <style:text-properties officeooo:rsid="004725dd"/>
    </style:style>
    <style:style style:name="T15" style:family="text">
      <style:text-properties officeooo:rsid="001d4454"/>
    </style:style>
    <style:style style:name="T16" style:family="text">
      <style:text-properties officeooo:rsid="00cf00dc"/>
    </style:style>
    <style:style style:name="T17" style:family="text">
      <style:text-properties fo:font-family="FontAwesome" officeooo:rsid="010f3b3b" style:font-family-asian="FontAwesome" style:font-family-complex="FontAwesome"/>
    </style:style>
    <style:style style:name="T18" style:family="text">
      <style:text-properties officeooo:rsid="00e0b736"/>
    </style:style>
    <style:style style:name="T19" style:family="text">
      <style:text-properties officeooo:rsid="00d160c0"/>
    </style:style>
    <style:style style:name="T20" style:family="text">
      <style:text-properties officeooo:rsid="0052e9ea"/>
    </style:style>
    <style:style style:name="T21" style:family="text">
      <style:text-properties officeooo:rsid="00582f6e"/>
    </style:style>
    <style:style style:name="T22" style:family="text">
      <style:text-properties officeooo:rsid="00136de2"/>
    </style:style>
    <style:style style:name="T23" style:family="text">
      <style:text-properties officeooo:rsid="0046d819"/>
    </style:style>
    <style:style style:name="T24" style:family="text">
      <style:text-properties fo:font-weight="bold" officeooo:rsid="0006377c" style:font-weight-asian="bold" style:font-weight-complex="bold"/>
    </style:style>
    <style:style style:name="T25" style:family="text">
      <style:text-properties officeooo:rsid="0006377c"/>
    </style:style>
    <style:style style:name="T26" style:family="text">
      <style:text-properties officeooo:rsid="000fb679"/>
    </style:style>
    <style:style style:name="T27" style:family="text">
      <style:text-properties style:text-underline-style="solid" style:text-underline-width="auto" style:text-underline-color="font-color" fo:font-weight="bold" officeooo:rsid="000903ae" style:font-weight-asian="bold" style:font-weight-complex="bold"/>
    </style:style>
    <style:style style:name="T28" style:family="text">
      <style:text-properties officeooo:rsid="000adcd1"/>
    </style:style>
    <style:style style:name="T29" style:family="text">
      <style:text-properties officeooo:rsid="000f04ac"/>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weight="normal" officeooo:rsid="00478422" style:font-weight-asian="normal" style:font-weight-complex="normal"/>
    </style:style>
    <style:style style:name="T32" style:family="text">
      <style:text-properties style:text-position="super 58%"/>
    </style:style>
    <style:style style:name="T33" style:family="text">
      <style:text-properties fo:font-weight="bold" officeooo:rsid="00569ead" style:font-weight-asian="bold" style:font-weight-complex="bold"/>
    </style:style>
    <style:style style:name="T34" style:family="text">
      <style:text-properties fo:font-weight="bold" officeooo:rsid="00557377" style:font-weight-asian="bold" style:font-weight-complex="bold"/>
    </style:style>
    <style:style style:name="T35" style:family="text">
      <style:text-properties officeooo:rsid="001a1a74"/>
    </style:style>
    <style:style style:name="T36" style:family="text">
      <style:text-properties officeooo:rsid="0041866f"/>
    </style:style>
    <style:style style:name="T37" style:family="text">
      <style:text-properties officeooo:rsid="0006cff0"/>
    </style:style>
    <style:style style:name="T38" style:family="text">
      <style:text-properties officeooo:rsid="002c6ea0"/>
    </style:style>
    <style:style style:name="T39" style:family="text">
      <style:text-properties officeooo:rsid="0061442e"/>
    </style:style>
    <style:style style:name="T40" style:family="text">
      <style:text-properties fo:font-family="'Nimbus Mono PS'" style:font-pitch="fixed"/>
    </style:style>
    <style:style style:name="T41" style:family="text">
      <style:text-properties officeooo:rsid="001519af"/>
    </style:style>
    <style:style style:name="T42" style:family="text">
      <style:text-properties officeooo:rsid="00569ead"/>
    </style:style>
    <style:style style:name="T43" style:family="text">
      <style:text-properties officeooo:rsid="0051d112"/>
    </style:style>
    <style:style style:name="T44" style:family="text">
      <style:text-properties officeooo:rsid="0058671b"/>
    </style:style>
    <style:style style:name="T45" style:family="text">
      <style:text-properties officeooo:rsid="003dcacb"/>
    </style:style>
    <style:style style:name="T46" style:family="text">
      <style:text-properties officeooo:rsid="005bc6af"/>
    </style:style>
    <style:style style:name="T47" style:family="text">
      <style:text-properties officeooo:rsid="004d9aff"/>
    </style:style>
    <style:style style:name="T48" style:family="text">
      <style:text-properties fo:font-weight="bold" officeooo:rsid="0006cff0" style:font-weight-asian="bold" style:font-weight-complex="bold"/>
    </style:style>
    <style:style style:name="T49" style:family="text">
      <style:text-properties fo:font-weight="bold" officeooo:rsid="002aa587" style:font-weight-asian="bold" style:font-weight-complex="bold"/>
    </style:style>
    <style:style style:name="T50" style:family="text">
      <style:text-properties officeooo:rsid="002aa587"/>
    </style:style>
    <style:style style:name="T51" style:family="text">
      <style:text-properties officeooo:rsid="001ed2eb"/>
    </style:style>
    <style:style style:name="T52" style:family="text">
      <style:text-properties fo:font-size="10pt" officeooo:rsid="003233fd" style:font-size-asian="10pt" style:font-size-complex="10pt"/>
    </style:style>
    <style:style style:name="T53" style:family="text">
      <style:text-properties fo:font-weight="normal" style:font-weight-asian="normal" style:font-weight-complex="normal"/>
    </style:style>
    <style:style style:name="T54" style:family="text">
      <style:text-properties fo:font-weight="normal" officeooo:rsid="003dcacb" style:font-weight-asian="normal" style:font-weight-complex="normal"/>
    </style:style>
    <style:style style:name="T55" style:family="text">
      <style:text-properties fo:font-weight="normal" officeooo:rsid="004340fc" style:font-weight-asian="normal" style:font-weight-complex="normal"/>
    </style:style>
    <style:style style:name="T56" style:family="text">
      <style:text-properties fo:font-weight="bold" officeooo:rsid="00304ef2" style:font-weight-asian="bold" style:font-weight-complex="bold"/>
    </style:style>
    <style:style style:name="T57" style:family="text">
      <style:text-properties fo:font-weight="normal" officeooo:rsid="00304ef2" style:font-weight-asian="normal" style:font-weight-complex="normal"/>
    </style:style>
    <style:style style:name="T58" style:family="text">
      <style:text-properties fo:font-weight="normal" officeooo:rsid="003ef0aa" style:font-weight-asian="normal" style:font-weight-complex="normal"/>
    </style:style>
    <style:style style:name="T59" style:family="text">
      <style:text-properties fo:font-weight="normal" officeooo:rsid="003233fd" style:font-weight-asian="normal" style:font-weight-complex="normal"/>
    </style:style>
    <style:style style:name="T60" style:family="text">
      <style:text-properties officeooo:rsid="003ef0aa"/>
    </style:style>
    <style:style style:name="T61" style:family="text">
      <style:text-properties officeooo:rsid="000d3b50"/>
    </style:style>
    <style:style style:name="T62" style:family="text">
      <style:text-properties officeooo:rsid="001709f7"/>
    </style:style>
    <style:style style:name="T63" style:family="text">
      <style:text-properties officeooo:rsid="003233fd"/>
    </style:style>
    <style:style style:name="T64" style:family="text">
      <style:text-properties fo:font-weight="normal" officeooo:rsid="000d3b50" style:font-weight-asian="normal" style:font-weight-complex="normal"/>
    </style:style>
    <style:style style:name="T65" style:family="text">
      <style:text-properties fo:font-weight="normal" officeooo:rsid="001ed2eb" style:font-weight-asian="normal" style:font-weight-complex="normal"/>
    </style:style>
    <style:style style:name="T66" style:family="text">
      <style:text-properties fo:font-weight="normal" officeooo:rsid="00147fe1" style:font-weight-asian="normal" style:font-weight-complex="normal"/>
    </style:style>
    <style:style style:name="T67" style:family="text">
      <style:text-properties fo:font-weight="normal" officeooo:rsid="001709f7" style:font-weight-asian="normal" style:font-weight-complex="normal"/>
    </style:style>
    <style:style style:name="T68" style:family="text">
      <style:text-properties fo:font-weight="bold" officeooo:rsid="0017c327" style:font-weight-asian="bold" style:font-weight-complex="bold"/>
    </style:style>
    <style:style style:name="T69" style:family="text">
      <style:text-properties fo:font-weight="bold" officeooo:rsid="002064e9" style:font-weight-asian="bold" style:font-weight-complex="bold"/>
    </style:style>
    <style:style style:name="T70" style:family="text">
      <style:text-properties officeooo:rsid="0017c327"/>
    </style:style>
    <style:style style:name="T71" style:family="text">
      <style:text-properties fo:font-weight="bold" officeooo:rsid="0048fbfa" style:font-weight-asian="bold" style:font-weight-complex="bold"/>
    </style:style>
    <style:style style:name="T72" style:family="text">
      <style:text-properties officeooo:rsid="004eaf6e"/>
    </style:style>
    <style:style style:name="T73" style:family="text">
      <style:text-properties officeooo:rsid="00557377"/>
    </style:style>
    <style:style style:name="T74" style:family="text">
      <style:text-properties officeooo:rsid="001d2245"/>
    </style:style>
    <style:style style:name="T75" style:family="text">
      <style:text-properties officeooo:rsid="0018743d"/>
    </style:style>
    <style:style style:name="T76" style:family="text">
      <style:text-properties fo:font-size="12pt" fo:font-weight="bold" style:font-size-asian="12pt" style:font-weight-asian="bold" style:font-size-complex="12pt" style:font-weight-complex="bold"/>
    </style:style>
    <style:style style:name="T77" style:family="text">
      <style:text-properties fo:font-size="12pt" style:font-size-asian="12pt" style:font-size-complex="12pt"/>
    </style:style>
    <style:style style:name="T78" style:family="text">
      <style:text-properties officeooo:rsid="001a907f"/>
    </style:style>
    <style:style style:name="T79" style:family="text">
      <style:text-properties officeooo:rsid="00304ef2"/>
    </style:style>
    <style:style style:name="T80" style:family="text">
      <style:text-properties officeooo:rsid="005f51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t Problems – potential fixes</text:p>
      <text:p text:style-name="P2"/>
      <text:p text:style-name="Standard"><text:span text:style-name="T1">TIP:</text:span><text:span text:style-name="T2"> </text:span>Before first boot <text:span text:style-name="T2">d</text:span><text:span text:style-name="T3">isconnect all external peripherals (USB drives, docks) before booting.</text:span></text:p>
      <text:p text:style-name="P3"/>
      <text:h text:style-name="P4" text:outline-level="2">Before first boot</text:h>
      <text:p text:style-name="P5"/>
      <text:h text:style-name="P6" text:outline-level="3"><text:span text:style-name="T4">USB </text:span><text:span text:style-name="T5">c</text:span><text:span text:style-name="T4">an </text:span><text:span text:style-name="T6">NOT</text:span><text:span text:style-name="T4"> boot</text:span></text:h>
      <text:p text:style-name="P7"/>
      <text:p text:style-name="P5"><text:span text:style-name="T7">P</text:span><text:span text:style-name="T8">ressing the PC maker's On</text:span><text:span text:style-name="T9">e</text:span><text:span text:style-name="T8"> Time Boot menu key </text:span><text:span text:style-name="T9">(F12) </text:span><text:span text:style-name="T8">doesn't let the PC boot.</text:span></text:p>
      <text:p text:style-name="P8"/>
      <text:list text:style-name="L1">
        <text:list-item>
          <text:p text:style-name="P9">Verify on another PC that the USB <text:span text:style-name="T10">you </text:span>created boots to <text:span text:style-name="T10">the desktop and </text:span>show<text:span text:style-name="T10">s</text:span> the Welcome screen.</text:p>
          <text:list>
            <text:list-item>
              <text:p text:style-name="P10"><text:span text:style-name="T11">Some USB 'burning' apps make only Legacy or UEFI boot able on some PCs. Try </text:span><text:a xlink:type="simple" xlink:href="https://forum.mxlinux.org/viewtopic.php?t=86046" text:style-name="Internet_20_link" text:visited-style-name="Visited_20_Internet_20_Link"><text:span text:style-name="T11">Rufus</text:span></text:a><text:span text:style-name="T11"> or </text:span><text:a xlink:type="simple" xlink:href="https://forum.mxlinux.org/viewtopic.php?t=86047" text:style-name="Internet_20_link" text:visited-style-name="Visited_20_Internet_20_Link"><text:span text:style-name="T11">Ventoy</text:span></text:a><text:span text:style-name="T11"> </text:span><text:span text:style-name="T12">app</text:span><text:span text:style-name="T11">.</text:span></text:p>
            </text:list-item>
          </text:list>
        </text:list-item>
        <text:list-item>
          <text:p text:style-name="P11">PC <text:span text:style-name="T11">[business grade] </text:span>has a setting <text:span text:style-name="T13">by USB port to </text:span>not allowing booting. Change <text:span text:style-name="T9">it </text:span>to allow.</text:p>
        </text:list-item>
        <text:list-item>
          <text:p text:style-name="P11">Some <text:span text:style-name="T13">older </text:span>PCs older allow USB booting only on certain <text:span text:style-name="T9">USB</text:span> ports.</text:p>
        </text:list-item>
        <text:list-item>
          <text:p text:style-name="P11"><text:span text:style-name="T9">V</text:span>e<text:span text:style-name="T9">r</text:span>y old (&gt;20 yrs) PC<text:span text:style-name="T9">s </text:span><text:span text:style-name="T13">(</text:span><text:span text:style-name="T14">PC </text:span><text:span text:style-name="T13">may be 32-bit – try MX 23 </text:span><text:span text:style-name="T14">386 edition</text:span><text:span text:style-name="T13">):</text:span></text:p>
          <text:list>
            <text:list-item>
              <text:p text:style-name="P11"><text:span text:style-name="T15">C</text:span>an only boot from CD/DVD or expansion card USB port.</text:p>
            </text:list-item>
            <text:list-item>
              <text:p text:style-name="P11"><text:span text:style-name="T15">Rufus -</text:span><text:span text:style-name="T16"> </text:span><text:span text:style-name="T15">c</text:span><text:span text:style-name="T16">lick '</text:span><text:span text:style-name="T17"> </text:span><text:span text:style-name="T16">Show advanced drive properties', check 'Add fixes for old BIOS</text:span><text:span text:style-name="T18">e</text:span><text:span text:style-name="T16">s (extra partition, align, etc.)', </text:span><text:span text:style-name="T19">then click START</text:span><text:span text:style-name="T16">.</text:span></text:p>
            </text:list-item>
          </text:list>
        </text:list-item>
      </text:list>
      <text:p text:style-name="P12"/>
      <text:h text:style-name="Heading_20_3" text:outline-level="3">Black screen <text:span text:style-name="T20">no/blinking cursor</text:span></text:h>
      <text:p text:style-name="Standard"/>
      <text:p text:style-name="P13">This may happen that you end up looking at an empty black screen that may have a blinking cursor in the corner. This represents a failure to start X, the windows system used by Linux, and is most often due to problems with the graphics driver being used.</text:p>
      <text:p text:style-name="P13"/>
      <text:p text:style-name="P13">Reboot. <text:span text:style-name="T21">S</text:span>elect &gt;&gt;&gt; Advanced Options &lt;&lt;&lt; then Failsafe options:</text:p>
      <text:p text:style-name="P13"/>
      <text:p text:style-name="P14">This launches a "failsafe" or "safe video" mode to load one of these boot parameters:</text:p>
      <text:list text:style-name="L2">
        <text:list-header>
          <text:p text:style-name="P15"/>
        </text:list-header>
      </text:list>
      <text:p text:style-name="P16">failsafe, failsafe nomodeset, load=all, noxorg, xorg=modesetting, xorg=safe</text:p>
      <text:p text:style-name="P13"/>
      <text:p text:style-name="P13">Arrow down, select one and press enter.</text:p>
      <text:p text:style-name="P13"/>
      <text:p text:style-name="P13">This will move you back one screen with Failsafe options: &lt;your selection&gt; Res<text:span text:style-name="T2">ume boot</text:span><text:span text:style-name="T21">ing</text:span>.</text:p>
      <text:p text:style-name="P13"/>
      <text:p text:style-name="P17">If this proves to be successful a Save options: choice is also present on this screen.</text:p>
      <text:p text:style-name="P17"/>
      <text:p text:style-name="P17">More of these cheat codes for Live USB can be found in the MX Wiki. Cheat codes for booting an installed system are different, and can be found in the same location.</text:p>
      <text:p text:style-name="P3"/>
      <text:p text:style-name="P18">“<text:span text:style-name="T4">EFI variables are not supported on this system</text:span>” – in terminal <text:span text:style-name="T22">(CTL-ALT-T)</text:span>, run efibootmgr. A list should be presented for UEFI <text:span text:style-name="T22">PC.</text:span> <text:span text:style-name="T22">A</text:span>n error: “EFI variables are not supported on this system” for a Legacy PC <text:span text:style-name="T23">is </text:span><text:soft-page-break/><text:span text:style-name="T23">normal</text:span>. The fix is to work entirely in one mode or the other, not a mix. Usually xaused by CSM/Legacy being enabled.</text:p>
      <text:p text:style-name="P19"/>
      <text:p text:style-name="P20"><text:span text:style-name="T24">Secure Boot</text:span><text:span text:style-name="T25"> </text:span><text:span text:style-name="T8">enabled/disabled. “</text:span><text:span text:style-name="T26">MX Linux has been blocked by the current security policy.</text:span><text:span text:style-name="T8">” </text:span><text:span text:style-name="T26">(or similar)</text:span></text:p>
      <text:p text:style-name="P21"/>
      <text:list text:style-name="L3">
        <text:list-item>
          <text:p text:style-name="P22"><text:span text:style-name="T8">When enabled, </text:span><text:span text:style-name="T12">Secure Boot </text:span><text:span text:style-name="T8">can prevent MX </text:span><text:span text:style-name="T12">Linux </text:span><text:span text:style-name="T8">21/MX </text:span><text:span text:style-name="T12">Linux </text:span><text:span text:style-name="T8">23 </text:span><text:span text:style-name="T12">(</text:span><text:span text:style-name="T8">an</text:span><text:span text:style-name="T9">y</text:span><text:span text:style-name="T8"> edition</text:span><text:span text:style-name="T12">)</text:span><text:span text:style-name="T8"> </text:span><text:span text:style-name="T9">from </text:span><text:span text:style-name="T8">booting.</text:span></text:p>
        </text:list-item>
        <text:list-item>
          <text:p text:style-name="P22"><text:span text:style-name="T8">MX </text:span><text:span text:style-name="T12">Linux </text:span><text:span text:style-name="T8">25 - </text:span><text:span text:style-name="T12">Secure Boot </text:span><text:span text:style-name="T8">enabled is supported </text:span><text:span text:style-name="T27">only</text:span><text:span text:style-name="T8"> on Xfce </text:span><text:span text:style-name="T28">(not AHS) </text:span><text:span text:style-name="T8">and Fluxbox editions.</text:span></text:p>
        </text:list-item>
        <text:list-item>
          <text:p text:style-name="P23"><text:span text:style-name="T29">D</text:span>espite <text:span text:style-name="T26">well intended </text:span>online guides<text:span text:style-name="T29"> </text:span>recommend<text:span text:style-name="T29">ations </text:span><text:span text:style-name="T26">on TPM</text:span><text:span text:style-name="T29">:</text:span></text:p>
          <text:list>
            <text:list-item>
              <text:p text:style-name="P24">TPM aka Trusted Platform Module <text:span text:style-name="T30">must</text:span> be <text:span text:style-name="T26">ENABLED</text:span>. It might be called PTT (Platform Trust Technology) for Intel or fTPM (firmware TPM) for AMD.</text:p>
            </text:list-item>
            <text:list-item>
              <text:p text:style-name="P25"><text:span text:style-name="T29">Security</text:span> certificate<text:span text:style-name="T29">s</text:span> MUST be present – do NOT delete them. <text:span text:style-name="T29">U</text:span>sually 2, Microsoft &amp; PC maker's.</text:p>
            </text:list-item>
          </text:list>
        </text:list-item>
      </text:list>
      <text:p text:style-name="P26"/>
      <text:p text:style-name="P27">Boot Path security</text:p>
      <text:p text:style-name="P28"/>
      <text:p text:style-name="P29"><text:span text:style-name="T31">This is</text:span> <text:span text:style-name="T28">a part of Secure Boot </text:span><text:span text:style-name="T12">or Security settings in PC firmware</text:span><text:span text:style-name="T28">.</text:span></text:p>
      <text:p text:style-name="P30"/>
      <text:list text:style-name="L4">
        <text:list-item>
          <text:p text:style-name="P31">Set to 'Custom' to allow non-Microsoft EFI file path.</text:p>
        </text:list-item>
      </text:list>
      <text:p text:style-name="P32"/>
      <text:p text:style-name="P32"><text:span text:style-name="T4">Grub can NOT be installed</text:span> – <text:span text:style-name="T12">The partition that is selected for ESP partition MUST have a pre-existing format.</text:span></text:p>
      <text:p text:style-name="P33"/>
      <text:h text:style-name="P34" text:outline-level="2">After Installation - 1<text:span text:style-name="T32">st</text:span> boot</text:h>
      <text:p text:style-name="Standard"/>
      <text:h text:style-name="Heading_20_3" text:outline-level="3">Black screen <text:span text:style-name="T20">no/blinking cursor</text:span></text:h>
      <text:p text:style-name="Standard"/>
      <text:p text:style-name="Standard">This may happen that you end up looking at an empty black screen that may have a blinking cursor in the corner. This represents a failure to start X, the windows system used by Linux, and is most often due to problems with the graphics driver being used.</text:p>
      <text:p text:style-name="Standard"/>
      <text:p text:style-name="P35"><text:span text:style-name="T33">An e</text:span><text:span text:style-name="T34">asy potential fix - </text:span><text:span text:style-name="T35">Only a </text:span><text:span text:style-name="T36">login prompt</text:span><text:span text:style-name="T37">. </text:span><text:span text:style-name="T38">Is the / disk full?</text:span></text:p>
      <text:p text:style-name="P35"/>
      <text:p text:style-name="P36">Intel <text:span text:style-name="T39">915 </text:span>integrated graphics</text:p>
      <text:p text:style-name="P37"/>
      <text:p text:style-name="P37">Two boot codes that may prove helpful:</text:p>
      <text:p text:style-name="P38"/>
      <text:p text:style-name="P39"><text:span text:style-name="T40">i915_invert</text:span> – invert brightness controls on some intel video cards.</text:p>
      <text:p text:style-name="P39"/>
      <text:p text:style-name="P39"><text:span text:style-name="T40">no_i915_invert</text:span> – disables inversion of brightness controls.</text:p>
      <text:p text:style-name="P35"/>
      <text:p text:style-name="P40"><text:span text:style-name="T38">Nvidia graphics card driver </text:span><text:span text:style-name="T41">issue</text:span><text:span text:style-name="T42">s</text:span></text:p>
      <text:p text:style-name="P35"/>
      <text:p text:style-name="P41"><text:span text:style-name="T43">W</text:span>ith older <text:span text:style-name="T43">N</text:span>vidia cards <text:span text:style-name="T42">and</text:span> <text:span text:style-name="T43">340/390</text:span><text:span text:style-name="T42"> </text:span>drivers and <text:span text:style-name="T43">P</text:span>lymouth (<text:span text:style-name="T42">used to display a graphic on </text:span>the splash screen).</text:p>
      <text:p text:style-name="P41"/>
      <text:p text:style-name="P41">Try this: If you have the <text:span text:style-name="T43">N</text:span>vidia<text:span text:style-name="T43"> </text:span>drive<text:span text:style-name="T43">r</text:span>s loaded. <text:span text:style-name="T20">E</text:span>dit the <text:span text:style-name="T20">G</text:span>rub screen and add to the <text:span text:style-name="T20">L</text:span>inux run line (right after quiet and splash, add the parameter ‘single’ <text:span text:style-name="T44">(without quotes)</text:span> and see if you get a boot.</text:p>
      <text:p text:style-name="P42"/>
      <text:p text:style-name="P42">If you get up to the desktop, <text:span text:style-name="T20">try</text:span> the following as a test: </text:p>
      <text:p text:style-name="P43"/>
      <text:p text:style-name="P44"><text:span text:style-name="Source_20_Text">sudo apt purge plymouth plymouth-themes</text:span></text:p>
      <text:p text:style-name="P44"><text:span text:style-name="Source_20_Text">sudo update-initramfs -u</text:span></text:p>
      <text:p text:style-name="P45"><text:span text:style-name="Source_20_Text">sudo update-grub</text:span></text:p>
      <text:p text:style-name="P46"><text:span text:style-name="T45">I</text:span><text:span text:style-name="T44">f this turns out to be successful remove the ‘single’ Kernel parameter and reboot.</text:span></text:p>
      <text:p text:style-name="P46">On the RTX, the issues were smaller; sometimes DRM would present problems during startup or when updating the drivers. I added these lines:</text:p>
      <text:p text:style-name="P47"><text:span text:style-name="Source_20_Text">nvidia-drm.modeset=1 nvidia-drm.fbdev=1</text:span></text:p>
      <text:p text:style-name="P48">It was not necessary to remove Plymouth.</text:p>
      <text:p text:style-name="P49">The problem for the GTX config, is with "nomodeset" than it is OK for X11 but not with Wayland.</text:p>
      <text:p text:style-name="P49"><text:line-break/>But maybe after the nvidia install, it is possible to remove "nomodeset" and instead add "nvidia-drm.modeset=1 nvidia-drm.fbdev=1" .</text:p>
      <text:p text:style-name="P50"/>
      <text:p text:style-name="P51"><text:span text:style-name="T46">Above </text:span>s<text:span text:style-name="T46">ou</text:span>rc<text:span text:style-name="T46">e</text:span>: https://forum.mxlinux.org/viewtopic.php?t=88621</text:p>
      <text:p text:style-name="P46"/>
      <text:p text:style-name="P46"><text:span text:style-name="T44">I</text:span><text:span text:style-name="T45">n MX Boot Options t</text:span><text:span text:style-name="T47">ry nomodesetting</text:span><text:span text:style-name="T45"> Kernel parameters. </text:span>Other codes a<text:span text:style-name="T36">re</text:span> in the <text:a xlink:type="simple" xlink:href="https://mxlinux.org/wiki/system/boot-parameters/" text:style-name="Internet_20_link" text:visited-style-name="Visited_20_Internet_20_Link">MX Wiki</text:a>.</text:p>
      <text:p text:style-name="P52"><text:soft-page-break/><text:span text:style-name="T48">'Grub rescue&gt;-' </text:span><text:span text:style-name="T49">or Grub&gt;</text:span><text:span text:style-name="T50"> </text:span><text:span text:style-name="T8">prompt – </text:span><text:span text:style-name="T51"><text:s/></text:span><text:a xlink:type="simple" xlink:href="https://www.linuxfoundation.org/blog/blog/classic-sysadmin-how-to-rescue-a-non-booting-grub-2-on-linux" text:style-name="Internet_20_link" text:visited-style-name="Visited_20_Internet_20_Link"><text:span text:style-name="T45">detailed troubleshooting help</text:span></text:a><text:span text:style-name="T41"> </text:span></text:p>
      <text:p text:style-name="P52"><text:span text:style-name="T41">“The 'wrong' entry that </text:span><text:span text:style-name="T45">[the] </text:span><text:span text:style-name="T41">Grub </text:span><text:span text:style-name="T45">[menu] </text:span><text:span text:style-name="T41">presented was chosen. Boot MX from USB, run UEFI Manager </text:span><text:span text:style-name="T51">and remove the entries from previous installs.” </text:span><text:span text:style-name="T45">Use the MX Tools app UEFI Manager to remove any invalid entries and reboot.</text:span><text:span text:style-name="T51"><text:tab/><text:tab/><text:tab/><text:tab/><text:tab/><text:tab/></text:span><text:span text:style-name="T52">(src:MX Forum)</text:span></text:p>
      <text:p text:style-name="P53"><text:span text:style-name="T4">i915 onboard Intel video</text:span> - Kernel boot parameters (use MX Boot Options) may be needed to overcome. Example: i915,invert_brightness=1 Symptome is brightness DOWN key RAISES screen brightness. <text:tab/></text:p>
      <text:p text:style-name="P54"/>
      <text:p text:style-name="P55">Low resolution<text:span text:style-name="T53"> <text:s/>- </text:span><text:span text:style-name="T54">try a different/reinstall video driver. </text:span><text:span text:style-name="T55">Use a xrandr workaround (use caution).</text:span></text:p>
      <text:p text:style-name="P56"><text:span text:style-name="T53"/></text:p>
      <text:p text:style-name="Standard"><text:span text:style-name="T56">Screen tearing </text:span><text:span text:style-name="T57">- In MX Tweak, Miscellaneous tab: </text:span><text:span text:style-name="T58">check “</text:span><text:span text:style-name="T59">Use intel driver...”</text:span><text:span text:style-name="T57"> The graphics driver entries vary depending on what video adapter is installed on the system. If a intel graphics board is detected, the user will be presented with the option show above, which will force the system to use the “intel” driver rather than the debian default “modesetting” driver. The “intel” configuration also includes a “tear free” option that many find helps with screen tearing.<text:tab/></text:span></text:p>
      <text:p text:style-name="P57"/>
      <text:p text:style-name="P58">MX Tweak, Compositor tab – try a different <text:span text:style-name="T60">(</text:span>more robust<text:span text:style-name="T60">)</text:span> <text:span text:style-name="T60">C</text:span>ompositor.</text:p>
      <text:p text:style-name="P59"/>
      <text:p text:style-name="P60"><text:span text:style-name="Strong_20_Emphasis"><text:span text:style-name="T37">"No boot device found" after OS install:</text:span></text:span></text:p>
      <text:p text:style-name="P60"/>
      <text:p text:style-name="P60"><text:span text:style-name="T37">Happens if you install Windows 10/11 or Linux on a system (especially those with 7th Gen Intel+ CPUs) that </text:span><text:span text:style-name="Emphasis"><text:span text:style-name="T37">requires</text:span></text:span><text:span text:style-name="T37"> UEFI, but it's set to Legacy mode (or vice versa), making the OS unbootable, requiring a reinstall in the correct UEFI mode. </text:span><text:a xlink:type="simple" xlink:href="https://www.google.com/search?client=firefox-b-1-d&amp;channel=entpr&amp;q=Force+UEFI&amp;mstk=AUtExfCtD1qSRG_-pjOpwoK_1p3x5Yvvu7ZDtboglef1ZRxWWI9YUCnn3k0HHZeBk9Mrkw4q_zTOV19t07efMEEoWkiL2n4dF1weVEGvMilpV9txyCy4RlfTYWgMU3MChFMS6K8&amp;csui=3&amp;ved=2ahUKEwiq3-W_282RAxVKFFkFHUmwCrgQgK4QegQIBxAE" text:style-name="Internet_20_link" text:visited-style-name="Visited_20_Internet_20_Link"><text:span text:style-name="Strong_20_Emphasis">Force UEFI</text:span></text:a><text:span text:style-name="Strong_20_Emphasis">:</text:span> On newer Dells (7th Gen+), the OS <text:span text:style-name="Emphasis">must</text:span> be installed in UEFI mode; reinstall if you used Legacy.</text:p>
      <text:p text:style-name="P61"/>
      <text:p text:style-name="P62"><text:span text:style-name="T4">“No OS found”</text:span><text:span text:style-name="T53"> – </text:span></text:p>
      <text:p text:style-name="P63"><text:span text:style-name="T53"/></text:p>
      <text:list text:style-name="L5">
        <text:list-item>
          <text:p text:style-name="P64">With a Legacy installation in the PCs BIOS, check <text:span text:style-name="T51">that</text:span> the Hard Disk Boot Order <text:span text:style-name="T61">has the drive MX Linux was installed on </text:span><text:span text:style-name="T51">a</text:span><text:span text:style-name="T62">s </text:span><text:span text:style-name="T51">the </text:span><text:span text:style-name="T62">first</text:span><text:span text:style-name="T61"> </text:span><text:span text:style-name="T51">i</text:span><text:span text:style-name="T61">n </text:span><text:span text:style-name="T51">the</text:span><text:span text:style-name="T61"> list</text:span><text:span text:style-name="T62">ing</text:span>.</text:p>
        </text:list-item>
        <text:list-item>
          <text:p text:style-name="P64">UEFI install – see Boot Path Security in <text:span text:style-name="T63">earlier </text:span>'Before <text:span text:style-name="T63">first</text:span><text:span text:style-name="T32">t</text:span> boot' section <text:span text:style-name="T63">of this document</text:span>.</text:p>
        </text:list-item>
      </text:list>
      <text:p text:style-name="P59"/>
      <text:p text:style-name="P65">Windows only – no Grub menu</text:p>
      <text:p text:style-name="P66"/>
      <text:list text:style-name="L6">
        <text:list-item>
          <text:list>
            <text:list-item>
              <text:list>
                <text:list-item>
                  <text:p text:style-name="P67"><text:span text:style-name="T64">Boot with MX </text:span><text:span text:style-name="T65">Linux </text:span><text:span text:style-name="T64">USB, run MX Boot Options &amp; verif</text:span><text:span text:style-name="T66">y</text:span><text:span text:style-name="T64"> MX </text:span><text:span text:style-name="T66">Linux is</text:span><text:span text:style-name="T64"> in listing, </text:span><text:span text:style-name="T66">at the top of the list</text:span><text:span text:style-name="T67">ing</text:span><text:span text:style-name="T64"> and </text:span><text:span text:style-name="T66">the</text:span><text:span text:style-name="T64"> </text:span><text:span text:style-name="T67">T</text:span><text:span text:style-name="T64">imeout: </text:span><text:span text:style-name="T66">is some number, that is not </text:span><text:span text:style-name="T64">0.</text:span></text:p>
                </text:list-item>
              </text:list>
            </text:list-item>
          </text:list>
        </text:list-item>
      </text:list>
      <text:p text:style-name="P68"/>
      <text:p text:style-name="P69"><text:span text:style-name="T4">Windows starts, but </text:span><text:span text:style-name="T68">I </text:span><text:span text:style-name="T4">have to use F-12 / F-9 </text:span><text:span text:style-name="T69">key </text:span><text:span text:style-name="T4">to get </text:span><text:span text:style-name="T68">the</text:span><text:span text:style-name="T4"> Grub </text:span><text:span text:style-name="T68">menu</text:span> – <text:span text:style-name="T70">s</text:span>ee above.</text:p>
      <text:p text:style-name="P69"/>
      <text:p text:style-name="P69"/>
      <text:p text:style-name="P70"><text:span text:style-name="T4">Getting </text:span><text:span text:style-name="T71">more </text:span><text:span text:style-name="T4">support</text:span> – if you have read this far <text:span text:style-name="T63">and have not found a solution, </text:span>visit the <text:a xlink:type="simple" xlink:href="https://forum.mxlinux.org/" text:style-name="Internet_20_link" text:visited-style-name="Visited_20_Internet_20_Link"><text:span text:style-name="T72">MX Linux Support Forum</text:span></text:a>. <text:span text:style-name="T73">Create a post and share t</text:span>he minstall.log <text:span text:style-name="T73">which </text:span><text:span text:style-name="T74">is </text:span>found in Quick System Info app. <text:span text:style-name="T74">This </text:span>has <text:span text:style-name="T74">developer </text:span>troubleshooting value and should be pasted into a help request at the MX Support <text:a xlink:type="simple" xlink:href="https://forum.mxlinux.org/index.php" text:style-name="Internet_20_link" text:visited-style-name="Visited_20_Internet_20_Link">Forum</text:a>. <text:span text:style-name="T75">Use the 'Copy for forum' button.</text:span></text:p>
      <text:p text:style-name="P70"/>
      <text:p text:style-name="P70"/>
      <text:p text:style-name="P70"/>
      <text:p text:style-name="P71"/>
      <text:p text:style-name="P70"/>
      <text:p text:style-name="P72"><text:span text:style-name="T76">Please direct ALL support requests to the MX Linux Forum</text:span><text:span text:style-name="T77"> <text:s/>-- <text:s/></text:span><text:a xlink:type="simple" xlink:href="https://forum.mxlinux.org/" text:style-name="Internet_20_link" text:visited-style-name="Visited_20_Internet_20_Link"><text:span text:style-name="T77">https://forum.mxlinux.org/</text:span></text:a></text:p>
      <text:p text:style-name="P73"><text:span text:style-name="T4">Created by</text:span> FullScale4Me on <text:span text:style-name="T78">November 1</text:span><text:span text:style-name="T79">5</text:span>, 2025<text:tab/><text:tab/><text:tab/><text:tab/><text:tab/> <text:s text:c="4"/><text:span text:style-name="T4">Last updated</text:span> <text:span text:style-name="T43">May</text:span><text:span text:style-name="T78"> </text:span><text:span text:style-name="T80">31</text:span> 202<text:span text:style-name="T4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Header" style:family="paragraph" style:parent-style-name="Header_20_and_20_Footer" style:class="extra">
      <style:paragraph-properties text:number-lines="false" text:line-number="0">
        <style:tab-stops>
          <style:tab-stop style:position="4in" style:type="center"/>
          <style:tab-stop style:position="8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ke O'Toole</meta:initial-creator>
    <meta:creation-date>2025-11-15T21:10:48.942300464</meta:creation-date>
    <meta:editing-cycles>90</meta:editing-cycles>
    <meta:editing-duration>P1DT21H36M</meta:editing-duration>
    <dc:title>Boot Problems – potential fixes</dc:title>
    <dc:date>2026-05-31T19:31:12.233472399</dc:date>
    <meta:generator>LibreOffice/26.2.3.2$Linux_X86_64 LibreOffice_project/620$Build-2</meta:generator>
    <meta:printed-by>PDF files</meta:printed-by>
    <meta:print-date>2026-05-31T19:30:46.351382036</meta:print-date>
    <meta:document-statistic meta:table-count="0" meta:image-count="0" meta:object-count="0" meta:page-count="4" meta:paragraph-count="73" meta:word-count="1228" meta:character-count="7156" meta:non-whitespace-character-count="5979"/>
  </office:meta>
</office:document-meta>
</file>